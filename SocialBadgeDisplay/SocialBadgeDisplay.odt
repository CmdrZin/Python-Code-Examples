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15b" officeooo:paragraph-rsid="0011815b"/>
    </style:style>
    <style:style style:name="P2" style:family="paragraph" style:parent-style-name="Standard">
      <style:text-properties officeooo:rsid="0013a92d" officeooo:paragraph-rsid="0011815b"/>
    </style:style>
    <style:style style:name="P3" style:family="paragraph" style:parent-style-name="Standard">
      <style:text-properties officeooo:rsid="001409a5" officeooo:paragraph-rsid="001409a5"/>
    </style:style>
    <style:style style:name="P4" style:family="paragraph" style:parent-style-name="Standard">
      <style:text-properties officeooo:rsid="0011815b" officeooo:paragraph-rsid="00132f99"/>
    </style:style>
    <style:style style:name="P5" style:family="paragraph" style:parent-style-name="Standard">
      <style:text-properties officeooo:rsid="0013a92d" officeooo:paragraph-rsid="0013a92d"/>
    </style:style>
    <style:style style:name="P6" style:family="paragraph" style:parent-style-name="Standard">
      <style:text-properties officeooo:rsid="00132f99" officeooo:paragraph-rsid="00132f99"/>
    </style:style>
    <style:style style:name="P7" style:family="paragraph" style:parent-style-name="Standard">
      <style:text-properties officeooo:rsid="0013a92d" officeooo:paragraph-rsid="0021eb80"/>
    </style:style>
    <style:style style:name="P8" style:family="paragraph" style:parent-style-name="Standard">
      <style:text-properties officeooo:rsid="001702d9" officeooo:paragraph-rsid="001702d9"/>
    </style:style>
    <style:style style:name="P9" style:family="paragraph" style:parent-style-name="Standard">
      <style:text-properties fo:font-weight="bold" officeooo:rsid="0013a92d" officeooo:paragraph-rsid="0013a92d" style:font-weight-asian="bold" style:font-weight-complex="bold"/>
    </style:style>
    <style:style style:name="P10" style:family="paragraph" style:parent-style-name="Standard" style:list-style-name="L1">
      <style:text-properties officeooo:rsid="0013a92d" officeooo:paragraph-rsid="0013a92d"/>
    </style:style>
    <style:style style:name="P11" style:family="paragraph" style:parent-style-name="Standard" style:list-style-name="L1">
      <style:text-properties officeooo:rsid="0013a92d" officeooo:paragraph-rsid="003d964e"/>
    </style:style>
    <style:style style:name="P12" style:family="paragraph" style:parent-style-name="Standard">
      <style:text-properties officeooo:rsid="0013a92d" officeooo:paragraph-rsid="003d964e"/>
    </style:style>
    <style:style style:name="P13" style:family="paragraph" style:parent-style-name="Standard">
      <style:text-properties style:text-line-through-style="solid" style:text-line-through-type="single" officeooo:rsid="0013a92d" officeooo:paragraph-rsid="0013a92d"/>
    </style:style>
    <style:style style:name="P14" style:family="paragraph" style:parent-style-name="Standard">
      <style:text-properties officeooo:rsid="0018f7ad" officeooo:paragraph-rsid="0018f7ad"/>
    </style:style>
    <style:style style:name="P15" style:family="paragraph" style:parent-style-name="Standard">
      <style:text-properties officeooo:rsid="0015f179" officeooo:paragraph-rsid="0015f179"/>
    </style:style>
    <style:style style:name="P16" style:family="paragraph" style:parent-style-name="Standard">
      <style:text-properties officeooo:rsid="0018cac5" officeooo:paragraph-rsid="0018cac5"/>
    </style:style>
    <style:style style:name="P17" style:family="paragraph" style:parent-style-name="Standard">
      <style:text-properties officeooo:rsid="001991c4" officeooo:paragraph-rsid="001991c4"/>
    </style:style>
    <style:style style:name="P18" style:family="paragraph" style:parent-style-name="Standard">
      <style:text-properties officeooo:rsid="0019c675" officeooo:paragraph-rsid="0019c675"/>
    </style:style>
    <style:style style:name="P19" style:family="paragraph" style:parent-style-name="Standard">
      <style:text-properties officeooo:rsid="001ac78b" officeooo:paragraph-rsid="001ac78b"/>
    </style:style>
    <style:style style:name="P20" style:family="paragraph" style:parent-style-name="Standard">
      <style:text-properties officeooo:rsid="001cb9cf" officeooo:paragraph-rsid="001cb9cf"/>
    </style:style>
    <style:style style:name="P21" style:family="paragraph" style:parent-style-name="Standard">
      <style:text-properties officeooo:rsid="001ceb33" officeooo:paragraph-rsid="001ceb33"/>
    </style:style>
    <style:style style:name="P22" style:family="paragraph" style:parent-style-name="Standard">
      <style:text-properties officeooo:rsid="001f4808" officeooo:paragraph-rsid="001f90cf"/>
    </style:style>
    <style:style style:name="P23" style:family="paragraph" style:parent-style-name="Standard">
      <style:text-properties officeooo:rsid="001f90cf" officeooo:paragraph-rsid="00202bdd"/>
    </style:style>
    <style:style style:name="P24" style:family="paragraph" style:parent-style-name="Standard">
      <style:text-properties officeooo:rsid="00202bdd" officeooo:paragraph-rsid="00202bdd"/>
    </style:style>
    <style:style style:name="P25" style:family="paragraph" style:parent-style-name="Standard">
      <style:text-properties officeooo:rsid="001e569a" officeooo:paragraph-rsid="00202bdd"/>
    </style:style>
    <style:style style:name="P26" style:family="paragraph" style:parent-style-name="Standard">
      <style:text-properties officeooo:rsid="0023dd98" officeooo:paragraph-rsid="0023dd98"/>
    </style:style>
    <style:style style:name="P27" style:family="paragraph" style:parent-style-name="Standard">
      <style:text-properties officeooo:rsid="002d94b3" officeooo:paragraph-rsid="002d94b3"/>
    </style:style>
    <style:style style:name="P28" style:family="paragraph" style:parent-style-name="Standard">
      <style:text-properties officeooo:rsid="002b9e94" officeooo:paragraph-rsid="002d94b3"/>
    </style:style>
    <style:style style:name="P29" style:family="paragraph" style:parent-style-name="Standard">
      <style:text-properties officeooo:rsid="002120dd" officeooo:paragraph-rsid="002ed168"/>
    </style:style>
    <style:style style:name="P30" style:family="paragraph" style:parent-style-name="Standard">
      <style:text-properties officeooo:rsid="002ed168" officeooo:paragraph-rsid="002ed168"/>
    </style:style>
    <style:style style:name="P31" style:family="paragraph" style:parent-style-name="Standard">
      <style:text-properties officeooo:rsid="00318b9b" officeooo:paragraph-rsid="00318b9b"/>
    </style:style>
    <style:style style:name="P32" style:family="paragraph" style:parent-style-name="Standard">
      <style:text-properties officeooo:rsid="00328406" officeooo:paragraph-rsid="00328406"/>
    </style:style>
    <style:style style:name="P33" style:family="paragraph" style:parent-style-name="Standard">
      <style:text-properties officeooo:rsid="00335d63" officeooo:paragraph-rsid="00335d63"/>
    </style:style>
    <style:style style:name="P34" style:family="paragraph" style:parent-style-name="Standard">
      <style:text-properties officeooo:rsid="0033ebd1" officeooo:paragraph-rsid="0033ebd1"/>
    </style:style>
    <style:style style:name="P35" style:family="paragraph" style:parent-style-name="Standard">
      <style:text-properties officeooo:rsid="001ceb33" officeooo:paragraph-rsid="003470e0"/>
    </style:style>
    <style:style style:name="P36" style:family="paragraph" style:parent-style-name="Standard">
      <style:text-properties officeooo:rsid="005026d6" officeooo:paragraph-rsid="003470e0"/>
    </style:style>
    <style:style style:name="P37" style:family="paragraph" style:parent-style-name="Standard">
      <style:text-properties officeooo:rsid="0034dc9b" officeooo:paragraph-rsid="0034dc9b"/>
    </style:style>
    <style:style style:name="P38" style:family="paragraph" style:parent-style-name="Standard">
      <style:text-properties officeooo:rsid="003846b9" officeooo:paragraph-rsid="003846b9"/>
    </style:style>
    <style:style style:name="P39" style:family="paragraph" style:parent-style-name="Standard">
      <style:paragraph-properties>
        <style:tab-stops>
          <style:tab-stop style:position="0.25in"/>
          <style:tab-stop style:position="1.25in"/>
        </style:tab-stops>
      </style:paragraph-properties>
      <style:text-properties officeooo:rsid="0034dc9b" officeooo:paragraph-rsid="0034dc9b"/>
    </style:style>
    <style:style style:name="P40" style:family="paragraph" style:parent-style-name="Standard">
      <style:paragraph-properties>
        <style:tab-stops>
          <style:tab-stop style:position="0.25in"/>
          <style:tab-stop style:position="1.25in"/>
        </style:tab-stops>
      </style:paragraph-properties>
      <style:text-properties style:text-line-through-style="solid" style:text-line-through-type="single" officeooo:rsid="0034dc9b" officeooo:paragraph-rsid="0034dc9b"/>
    </style:style>
    <style:style style:name="P41" style:family="paragraph" style:parent-style-name="Standard">
      <style:paragraph-properties>
        <style:tab-stops>
          <style:tab-stop style:position="0.25in"/>
          <style:tab-stop style:position="1.25in"/>
        </style:tab-stops>
      </style:paragraph-properties>
      <style:text-properties officeooo:rsid="0034dc9b" officeooo:paragraph-rsid="003846b9"/>
    </style:style>
    <style:style style:name="P42" style:family="paragraph" style:parent-style-name="Standard">
      <style:paragraph-properties>
        <style:tab-stops>
          <style:tab-stop style:position="0.25in"/>
          <style:tab-stop style:position="1.25in"/>
        </style:tab-stops>
      </style:paragraph-properties>
      <style:text-properties officeooo:rsid="00362199" officeooo:paragraph-rsid="00362199"/>
    </style:style>
    <style:style style:name="P43" style:family="paragraph" style:parent-style-name="Standard">
      <style:paragraph-properties>
        <style:tab-stops>
          <style:tab-stop style:position="0.25in"/>
          <style:tab-stop style:position="1.25in"/>
        </style:tab-stops>
      </style:paragraph-properties>
      <style:text-properties officeooo:rsid="00362199" officeooo:paragraph-rsid="003846b9"/>
    </style:style>
    <style:style style:name="P44" style:family="paragraph" style:parent-style-name="Standard">
      <style:paragraph-properties>
        <style:tab-stops>
          <style:tab-stop style:position="0.25in"/>
          <style:tab-stop style:position="1.25in"/>
        </style:tab-stops>
      </style:paragraph-properties>
      <style:text-properties officeooo:rsid="003bcbd6" officeooo:paragraph-rsid="003bcbd6"/>
    </style:style>
    <style:style style:name="P45" style:family="paragraph" style:parent-style-name="Standard">
      <style:paragraph-properties>
        <style:tab-stops>
          <style:tab-stop style:position="0.25in"/>
          <style:tab-stop style:position="1.25in"/>
        </style:tab-stops>
      </style:paragraph-properties>
      <style:text-properties officeooo:rsid="0037acca" officeooo:paragraph-rsid="0037acca"/>
    </style:style>
    <style:style style:name="P46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37acca" officeooo:paragraph-rsid="0037acca"/>
    </style:style>
    <style:style style:name="P47" style:family="paragraph" style:parent-style-name="Standard">
      <style:text-properties officeooo:rsid="003c9a16" officeooo:paragraph-rsid="003c9a16"/>
    </style:style>
    <style:style style:name="P48" style:family="paragraph" style:parent-style-name="Standard">
      <style:text-properties officeooo:rsid="0037b29d" officeooo:paragraph-rsid="003c9a16"/>
    </style:style>
    <style:style style:name="P49" style:family="paragraph" style:parent-style-name="Standard">
      <style:text-properties style:text-line-through-style="solid" style:text-line-through-type="single" officeooo:rsid="0037b29d" officeooo:paragraph-rsid="0037b29d"/>
    </style:style>
    <style:style style:name="P50" style:family="paragraph" style:parent-style-name="Standard">
      <style:text-properties officeooo:rsid="003cbf03" officeooo:paragraph-rsid="003cbf03"/>
    </style:style>
    <style:style style:name="P51" style:family="paragraph" style:parent-style-name="Standard">
      <style:text-properties officeooo:rsid="003d50a8" officeooo:paragraph-rsid="003d50a8"/>
    </style:style>
    <style:style style:name="P52" style:family="paragraph" style:parent-style-name="Standard">
      <style:text-properties officeooo:rsid="003d964e" officeooo:paragraph-rsid="003d964e"/>
    </style:style>
    <style:style style:name="P53" style:family="paragraph" style:parent-style-name="Standard">
      <style:text-properties officeooo:rsid="00403042" officeooo:paragraph-rsid="00403042"/>
    </style:style>
    <style:style style:name="P54" style:family="paragraph" style:parent-style-name="Standard">
      <style:text-properties officeooo:rsid="0041c147" officeooo:paragraph-rsid="0041c147"/>
    </style:style>
    <style:style style:name="P55" style:family="paragraph" style:parent-style-name="Standard">
      <style:text-properties officeooo:rsid="0044a811" officeooo:paragraph-rsid="0044a811"/>
    </style:style>
    <style:style style:name="P56" style:family="paragraph" style:parent-style-name="Standard">
      <style:text-properties style:font-name="Courier New" officeooo:rsid="0044a811" officeooo:paragraph-rsid="0044a811"/>
    </style:style>
    <style:style style:name="P57" style:family="paragraph" style:parent-style-name="Standard">
      <style:text-properties style:font-name="Courier New" officeooo:rsid="0044a811" officeooo:paragraph-rsid="0044f231"/>
    </style:style>
    <style:style style:name="P58" style:family="paragraph" style:parent-style-name="Standard">
      <style:text-properties officeooo:rsid="0044f231" officeooo:paragraph-rsid="0044f231"/>
    </style:style>
    <style:style style:name="P59" style:family="paragraph" style:parent-style-name="Standard">
      <style:text-properties officeooo:rsid="00482ea8" officeooo:paragraph-rsid="00482ea8"/>
    </style:style>
    <style:style style:name="P60" style:family="paragraph" style:parent-style-name="Standard">
      <style:text-properties officeooo:rsid="00488a10" officeooo:paragraph-rsid="00488a10"/>
    </style:style>
    <style:style style:name="P61" style:family="paragraph" style:parent-style-name="Standard">
      <style:text-properties officeooo:rsid="004a3138" officeooo:paragraph-rsid="004a3138"/>
    </style:style>
    <style:style style:name="T1" style:family="text">
      <style:text-properties officeooo:rsid="0013a92d"/>
    </style:style>
    <style:style style:name="T2" style:family="text">
      <style:text-properties officeooo:rsid="00482ea8"/>
    </style:style>
    <style:style style:name="T3" style:family="text">
      <style:text-properties officeooo:rsid="0011815b"/>
    </style:style>
    <style:style style:name="T4" style:family="text">
      <style:text-properties officeooo:rsid="00132f99"/>
    </style:style>
    <style:style style:name="T5" style:family="text">
      <style:text-properties fo:font-weight="bold" officeooo:rsid="003d964e" style:font-weight-asian="bold" style:font-weight-complex="bold"/>
    </style:style>
    <style:style style:name="T6" style:family="text">
      <style:text-properties officeooo:rsid="003d964e"/>
    </style:style>
    <style:style style:name="T7" style:family="text">
      <style:text-properties officeooo:rsid="0018f7ad"/>
    </style:style>
    <style:style style:name="T8" style:family="text">
      <style:text-properties officeooo:rsid="001702d9"/>
    </style:style>
    <style:style style:name="T9" style:family="text">
      <style:text-properties officeooo:rsid="001ac78b"/>
    </style:style>
    <style:style style:name="T10" style:family="text">
      <style:text-properties officeooo:rsid="001e569a"/>
    </style:style>
    <style:style style:name="T11" style:family="text">
      <style:text-properties officeooo:rsid="001d8b48"/>
    </style:style>
    <style:style style:name="T12" style:family="text">
      <style:text-properties officeooo:rsid="001f90cf"/>
    </style:style>
    <style:style style:name="T13" style:family="text">
      <style:text-properties officeooo:rsid="00202bdd"/>
    </style:style>
    <style:style style:name="T14" style:family="text">
      <style:text-properties officeooo:rsid="0023dd98"/>
    </style:style>
    <style:style style:name="T15" style:family="text">
      <style:text-properties officeooo:rsid="002d94b3"/>
    </style:style>
    <style:style style:name="T16" style:family="text">
      <style:text-properties officeooo:rsid="003470e0"/>
    </style:style>
    <style:style style:name="T17" style:family="text">
      <style:text-properties officeooo:rsid="002ed168"/>
    </style:style>
    <style:style style:name="T18" style:family="text">
      <style:text-properties officeooo:rsid="00213eba"/>
    </style:style>
    <style:style style:name="T19" style:family="text">
      <style:text-properties officeooo:rsid="00335d63"/>
    </style:style>
    <style:style style:name="T20" style:family="text">
      <style:text-properties officeooo:rsid="0033ebd1"/>
    </style:style>
    <style:style style:name="T21" style:family="text">
      <style:text-properties officeooo:rsid="00307054"/>
    </style:style>
    <style:style style:name="T22" style:family="text">
      <style:text-properties officeooo:rsid="005063ac"/>
    </style:style>
    <style:style style:name="T23" style:family="text">
      <style:text-properties officeooo:rsid="00538441"/>
    </style:style>
    <style:style style:name="T24" style:family="text">
      <style:text-properties officeooo:rsid="00362199"/>
    </style:style>
    <style:style style:name="T25" style:family="text">
      <style:text-properties officeooo:rsid="003846b9"/>
    </style:style>
    <style:style style:name="T26" style:family="text">
      <style:text-properties officeooo:rsid="003c9a16"/>
    </style:style>
    <style:style style:name="T27" style:family="text">
      <style:text-properties officeooo:rsid="0038f2d5"/>
    </style:style>
    <style:style style:name="T28" style:family="text">
      <style:text-properties officeooo:rsid="003a185f"/>
    </style:style>
    <style:style style:name="T29" style:family="text">
      <style:text-properties officeooo:rsid="0037acca"/>
    </style:style>
    <style:style style:name="T30" style:family="text">
      <style:text-properties officeooo:rsid="003b8b7f"/>
    </style:style>
    <style:style style:name="T31" style:family="text">
      <style:text-properties officeooo:rsid="0037b29d"/>
    </style:style>
    <style:style style:name="T32" style:family="text">
      <style:text-properties officeooo:rsid="003d4106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3e448f"/>
    </style:style>
    <style:style style:name="T35" style:family="text">
      <style:text-properties officeooo:rsid="0044f231"/>
    </style:style>
    <style:style style:name="T36" style:family="text">
      <style:text-properties officeooo:rsid="0046cb8b"/>
    </style:style>
    <style:style style:name="T37" style:family="text">
      <style:text-properties officeooo:rsid="004b22e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cialBadgeDisplay</text:span>.odt</text:p>
      <text:p text:style-name="P2">04mar26</text:p>
      <text:p text:style-name="P3"><text:span text:style-name="T2">26may</text:span>26</text:p>
      <text:p text:style-name="P4"/>
      <text:p text:style-name="P5">Design and Log Notes for a Social Badge Display using PySerial and PyGame</text:p>
      <text:p text:style-name="P5"/>
      <text:p text:style-name="P6">ref1: <text:a xlink:type="simple" xlink:href="https://www.pygame.org/docs/" text:style-name="Internet_20_link" text:visited-style-name="Visited_20_Internet_20_Link">https://www.pygame.org/docs/</text:a> - Primary documentation <text:span text:style-name="T1">for PyGame</text:span></text:p>
      <text:p text:style-name="P7">ref2: <text:a xlink:type="simple" xlink:href="https://pyserial.readthedocs.io/en/latest/" text:style-name="Internet_20_link" text:visited-style-name="Visited_20_Internet_20_Link">https://pyserial.readthedocs.io/en/latest/</text:a><text:span text:style-name="T3"> - </text:span><text:span text:style-name="T4">Primary documentation </text:span>for PySerial</text:p>
      <text:p text:style-name="P3">ref3: <text:a xlink:type="simple" xlink:href="https://pygame.readthedocs.io/en/latest/4_text/text.html" text:style-name="Internet_20_link" text:visited-style-name="Visited_20_Internet_20_Link">https://pygame.readthedocs.io/en/latest/4_text/text.html</text:a> - Pygame Tutorial</text:p>
      <text:p text:style-name="P8">ref4: <text:a xlink:type="simple" xlink:href="https://www.w3schools.com/python/python_oop.asp" text:style-name="Internet_20_link" text:visited-style-name="Visited_20_Internet_20_Link">https://www.w3schools.com/python/python_oop.asp</text:a> - Classes</text:p>
      <text:p text:style-name="P5"/>
      <text:p text:style-name="P5"/>
      <text:p text:style-name="P1">This <text:span text:style-name="T1">app collects ID logs from IR Social badges through the serial port and displays them in a list of contacts for each ID.</text:span></text:p>
      <text:p text:style-name="P5"/>
      <text:p text:style-name="P9">OPTIONAL MODS</text:p>
      <text:list text:style-name="L1">
        <text:list-item>
          <text:p text:style-name="P10">Display the number of unique contacts with each contact ID. A unique contact is one that occurs with a minimum 5 min delay since that last time it contacted that ID.</text:p>
        </text:list-item>
        <text:list-item>
          <text:p text:style-name="P10">Display the longest continual contact time with a given ID.</text:p>
        </text:list-item>
        <text:list-item>
          <text:p text:style-name="P10">Use a network graph to show inter-connections between IDs. <text:span text:style-name="T5">Done</text:span><text:span text:style-name="T6">.</text:span></text:p>
        </text:list-item>
        <text:list-item>
          <text:p text:style-name="P11">Users may enter a NAME to be associated with their ID.</text:p>
        </text:list-item>
      </text:list>
      <text:p text:style-name="P12"/>
      <text:p text:style-name="P5"/>
      <text:p text:style-name="P13">Step 1: Format the screen to display a list of IDs and contacts using generated data lists.</text:p>
      <text:p text:style-name="P3">Render text[3]. <text:span text:style-name="T7">O</text:span>k</text:p>
      <text:p text:style-name="P14">Step 2: Use NetDisplay to show Nodes (Badges) and Links (Connections)</text:p>
      <text:p text:style-name="P15">Use a <text:span text:style-name="T7">list</text:span> to store <text:span text:style-name="T7">Badges</text:span>. <text:span text:style-name="T8">Make a </text:span><text:span text:style-name="T7">Badge</text:span><text:span text:style-name="T8"> class. </text:span><text:span text:style-name="T7">Ok.</text:span></text:p>
      <text:p text:style-name="P14">MOD netdisplay to show Badge ID &amp; Name. Ok.</text:p>
      <text:p text:style-name="P14">When a Badge is added to the Net, add any Badges in its list that are not already in the Net. Ok.</text:p>
      <text:p text:style-name="P14"/>
      <text:p text:style-name="P16">Using NetDisplay, verified links are in BLACK, unverified are in RED.</text:p>
      <text:p text:style-name="P16">Verified: Badges are in each others contact list.</text:p>
      <text:p text:style-name="P16"><text:tab/>list[node1].links.index(node2) == True</text:p>
      <text:p text:style-name="P16"><text:tab/>list[node2].links.index(node1) == True</text:p>
      <text:p text:style-name="P17">NOTE: To modify a Global variable, declare it global at the top of the def function.</text:p>
      <text:p text:style-name="P18">Need double the separation distance for Nodes. <text:span text:style-name="T9">Ok, use half size in netdisplay. Ok</text:span></text:p>
      <text:p text:style-name="P19">Use 1:6 direction move to change col/row. Can circle around center. +1, +2, +3</text:p>
      <text:p text:style-name="P20">One circle path done. Now for dist = 2.</text:p>
      <text:p text:style-name="P21">23mar26</text:p>
      <text:p text:style-name="P21"><text:span text:style-name="T10">L</text:span>ook for *ID,id,id,…,ID* for Dump. <text:span text:style-name="T10">Ok.</text:span></text:p>
      <text:p text:style-name="P21">verify serial. <text:span text:style-name="T11">ok. integrate into sbn. sbd_serial.py …. use ord(‘*’) to get 42 to match binary serial stream.</text:span></text:p>
      <text:p text:style-name="P22">Display Text: create image, blit to sceen. New file textdisplay.py. Pass in screen. <text:span text:style-name="T12">DONE.</text:span></text:p>
      <text:p text:style-name="P23">Make Serial module. <text:span text:style-name="T13">Ok.</text:span></text:p>
      <text:p text:style-name="P24">Mod serial to test buffer. <text:span text:style-name="T14">OK</text:span></text:p>
      <text:p text:style-name="P25"><text:span text:style-name="T13">Mod Serial to </text:span>Parse Dump string.</text:p>
      <text:p text:style-name="P26">Remove DEBUG printouts in Host. Ok. <text:span text:style-name="T15">Serial to PC clean now.</text:span></text:p>
      <text:p text:style-name="P27">27mar26</text:p>
      <text:p text:style-name="P28">IDEA: How NOT to record IDs fro<text:span text:style-name="T16">m</text:span> other badge Dumps. Set MSB on dump. Have Host remove it. <text:span text:style-name="T17">Done.</text:span></text:p>
      <text:p text:style-name="P29">02apr26</text:p>
      <text:p text:style-name="P29"><text:soft-page-break/>Need to test for NO Ports connected. <text:span text:style-name="T18">ok.</text:span></text:p>
      <text:p text:style-name="P30">Move<text:span text:style-name="T19">d</text:span> <text:span text:style-name="T20">h</text:span>ex node code <text:span text:style-name="T21">from sbd.py</text:span> into hexnode.py file.</text:p>
      <text:p text:style-name="P31">hexnode: Given an ID find the Hex position in a counter-clock wise spiral with 0000 in the center.</text:p>
      <text:p text:style-name="P31">The spiral starts at the center hex, goes one hex up from the center and makes a ring, counter-clockwise, of six hexes.</text:p>
      <text:p text:style-name="P31">It then goes two hexes up from the center and makes a ring, counter-clockwise, of twelve hexes.</text:p>
      <text:p text:style-name="P32">This repeats for a circle of eighteen hexes three hexes up from the center.</text:p>
      <text:p text:style-name="P33">04apr26</text:p>
      <text:p text:style-name="P33">Good out to 397 nodes. WOOT.</text:p>
      <text:p text:style-name="P34">05apr26</text:p>
      <text:p text:style-name="P34">Increased by one ring, corrected hex skew, and centered for 1400x1400. 468 nodes.</text:p>
      <text:p text:style-name="P35">TODO:</text:p>
      <text:p text:style-name="P36"><text:tab/><text:span text:style-name="T22">Add </text:span><text:span text:style-name="T23">Node </text:span><text:span text:style-name="T22">links</text:span></text:p>
      <text:p text:style-name="P37">06apr26</text:p>
      <text:p text:style-name="P38">11apr26 updated</text:p>
      <text:p text:style-name="P39">The Badge class contains:</text:p>
      <text:p text:style-name="P39"><text:tab/>id<text:tab/>the badge ID (16-bit int)</text:p>
      <text:p text:style-name="P40"><text:tab/>badgeList[]<text:tab/>an array of contacted badges (<text:span text:style-name="T24">int IDs</text:span>)</text:p>
      <text:p text:style-name="P41"><text:tab/><text:span text:style-name="T25">contactId</text:span>List[]<text:tab/>an array of contacted badges (<text:span text:style-name="T24">int IDs</text:span>). <text:span text:style-name="T26">Use getBadge(id) to get object.</text:span></text:p>
      <text:p text:style-name="P41"><text:tab/>x,y<text:tab/>the badge node x,y plot location (int,int)</text:p>
      <text:p text:style-name="P39"><text:tab/>count<text:tab/>number of contacts. should be size of badgeList{}.</text:p>
      <text:p text:style-name="P39"><text:tab/>name<text:tab/>four character max string to go with ID (string)</text:p>
      <text:p text:style-name="P42">sbd</text:p>
      <text:p text:style-name="P43"><text:tab/>Maintains the badgeList <text:span text:style-name="T25">{}</text:span>. A <text:span text:style-name="T25">Directory</text:span> of Badge objects <text:span text:style-name="T25">indexed by Badge ID.</text:span></text:p>
      <text:p text:style-name="P43"><text:tab/><text:span text:style-name="T27">BadgeID(int): Badge(Badge)<text:tab/></text:span><text:span text:style-name="T28">The ID can be used to look-up a Badge.</text:span></text:p>
      <text:p text:style-name="P43"><text:tab/><text:span text:style-name="T25">C</text:span><text:span text:style-name="T29">onnect list is </text:span><text:span text:style-name="T25">only </text:span><text:span text:style-name="T29">Badge </text:span><text:span text:style-name="T25">Ids. </text:span><text:span text:style-name="T26">Ok.</text:span></text:p>
      <text:p text:style-name="P43"><text:tab/><text:span text:style-name="T30">Convert dump(str[]) to int[] before processing further. </text:span><text:span text:style-name="T26">done.</text:span></text:p>
      <text:p text:style-name="P44"><text:tab/>Move badgeList to Badge so it is accessible by netdisplay. <text:span text:style-name="T26">done.</text:span></text:p>
      <text:p text:style-name="P45">netdisplay</text:p>
      <text:p text:style-name="P45"><text:tab/>Nodes ok.</text:p>
      <text:p text:style-name="P45"><text:tab/>Links</text:p>
      <text:p text:style-name="P46"><text:tab/><text:tab/>Scan though nodeList. Draw line between node and each Badge in the Badge.badgeList[]. <text:span text:style-name="T31">OK.</text:span></text:p>
      <text:p text:style-name="P36"><text:tab/><text:span text:style-name="T22">Separate Test data mode and Live mode in sbd.py code. </text:span><text:span text:style-name="T31">OK.</text:span></text:p>
      <text:p text:style-name="P36"><text:tab/><text:span text:style-name="T31">All working now for display. WOO HOO.</text:span></text:p>
      <text:p text:style-name="P47">11apr26</text:p>
      <text:p text:style-name="P47">ID control updated. back to working again.</text:p>
      <text:p text:style-name="P48"/>
      <text:p text:style-name="P48">Host support</text:p>
      <text:p text:style-name="P49"><text:tab/>TODO: Upload/Save ID list for restore.</text:p>
      <text:p text:style-name="P50">15apr26</text:p>
      <text:p text:style-name="P50">Need to serialize Badge for JSON. <text:span text:style-name="T32">Added to sbd.py .. seems to work. save/restore JSON list of Badges.</text:span></text:p>
      <text:p text:style-name="P51">17apr26</text:p>
      <text:p text:style-name="P51">BUG: “If not in” stopped updates. Allow updating a Badge. Fixed.</text:p>
      <text:p text:style-name="P51">19apr26</text:p>
      <text:p text:style-name="P51">BUG: Only close serial port if one was opened. <text:span text:style-name="T33">Fixed</text:span>.</text:p>
      <text:p text:style-name="P52">23apr26</text:p>
      <text:p text:style-name="P52">TODO: Add 4 character name entry for an ID. <text:span text:style-name="T34">(see TextBoxExample.py code)</text:span></text:p>
      <text:p text:style-name="P53">30apr26</text:p>
      <text:p text:style-name="P53">To use Mouse Over, would need to make colliders of each node. Cumbersome.</text:p>
      <text:p text:style-name="P53"><text:soft-page-break/>Make ‘enter ID’ box. Match to Node and display ID and Name. Allow edit of Name box.</text:p>
      <text:p text:style-name="P53">RMC Id input to input ID. Process on ‘ENTER’. If valid ID, lock and change color.</text:p>
      <text:p text:style-name="P53">Show Name box and move focus to it. Limit to 4 characters. ‘ENTER’ to accept, ‘ESC’ to abort.</text:p>
      <text:p text:style-name="P54">Ok..works..SocialBadgeDisplay_Beta07.zip</text:p>
      <text:p text:style-name="P55">26may26</text:p>
      <text:p text:style-name="P55">Move to Laptop .. run .. hmm .. install screeninfo .. </text:p>
      <text:p text:style-name="P55">open terminal in C:\Data\SynShopTag\DEFCON_2026\Code\Python\SocialBadgeDisplay</text:p>
      <text:p text:style-name="P56">&gt; pip install screeninfo</text:p>
      <text:p text:style-name="P55">ok .. update pip also .. ok .. restart for path update. <text:span text:style-name="T35">Hmm… install pygame</text:span></text:p>
      <text:p text:style-name="P57">&gt; pip install <text:span text:style-name="T35">pygame</text:span></text:p>
      <text:p text:style-name="P58">ok .. restart .. <text:span text:style-name="T36">install pyserial .. </text:span></text:p>
      <text:p text:style-name="P59">Need to reduce to 900x900 for laptop. Scale other object to size.</text:p>
      <text:p text:style-name="P60">Center display.</text:p>
      <text:p text:style-name="P61">BUG: Not saving after Node edit. <text:span text:style-name="T37">Fixed. zip</text:span></text:p>
      <text:p text:style-name="P61"/>
      <text:p text:style-name="P61"/>
      <text:p text:style-name="P55"/>
      <text:p text:style-name="P53"/>
      <text:p text:style-name="P52"/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4T22:49:27.331818500</meta:creation-date>
    <meta:editing-duration>PT10H54M50S</meta:editing-duration>
    <meta:editing-cycles>40</meta:editing-cycles>
    <meta:generator>LibreOffice/25.8.6.2$Windows_X86_64 LibreOffice_project/b4b39682cd9868fa725bc664aff94278d315bd04</meta:generator>
    <dc:title>BasicNotes</dc:title>
    <meta:initial-creator>CmdrZin</meta:initial-creator>
    <dc:date>2026-05-26T19:08:38.671875800</dc:date>
    <dc:creator>CmdrZin</dc:creator>
    <meta:document-statistic meta:table-count="0" meta:image-count="0" meta:object-count="0" meta:page-count="3" meta:paragraph-count="100" meta:word-count="835" meta:character-count="4968" meta:non-whitespace-character-count="4214"/>
    <meta:template xlink:type="simple" xlink:actuate="onRequest" xlink:title="BasicNotes" xlink:href="../../../../Users/chip/AppData/Roaming/LibreOffice/4/user/template/BasicNotes.ott" meta:date="2025-09-14T22:49:27.274188900"/>
  </office:meta>
</office:document-meta>
</file>